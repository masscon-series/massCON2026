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">PSD X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>Experimental Operating System that aims to replace BSDs , Hurd , Linux, and others<text:tab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SD X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GPLv3-or-later kernel with GNU at first to escape from SaaS exploit</text:p>
              </text:list-item>
              <text:list-item>
                <text:p>“monorepo codebase” from hackers to end-users</text:p>
              </text:list-item>
              <text:list-item>
                <text:p><text:span text:style-name="T1">Decentralized</text:span> community which works remotely globally 24/7/365</text:p>
              </text:list-item>
              <text:list-item>
                <text:p><text:a xlink:href="https://source.masscollabs.xyz/" xlink:type="simple">Forgejo</text:a><text:s/>+ <text:a xlink:href="https://ci.masscollabs.xyz/" xlink:type="simple">Woodpecker</text:a><text:s/>CI/CD + <text:a xlink:href="https://forums.masscollabs.xyz/" xlink:type="simple">Discourse</text:a><text:s/>forums</text:p>
              </text:list-item>
              <text:list-item>
                <text:p>PSD is built by someone like you for every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Q&amp;A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4">Email to : <text:a xlink:href="mailto:mertgor@qbnetworks.xyz" xlink:type="simple">mertgor@qbnetworks.xyz</text:a></text:p>
              </text:list-item>
              <text:list-item>
                <text:p text:style-name="P4">GPG Key ID : 0xCD9E83BD9F84F0AB</text:p>
              </text:list-item>
              <text:list-item>
                <text:p text:style-name="P4">This document is licensed under the terms of <text:a xlink:href="https://github.com/masscollabs/Creative-Commons-Markdown/blob/main/4.0/by-sa.markdown" xlink:type="simple">CC BY-SA 4.0</text:a><text:s/>or later licens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07:01:36.449899460</meta:creation-date>
    <meta:editing-duration>PT8M14S</meta:editing-duration>
    <meta:editing-cycles>17</meta:editing-cycles>
    <meta:generator>LibreOffice/24.2.7.2$Linux_X86_64 LibreOffice_project/420$Build-2</meta:generator>
    <dc:title>DNA</dc:title>
    <dc:date>2026-04-30T07:09:57.774438508</dc:date>
    <meta:document-statistic meta:object-count="114"/>
  </office:meta>
</office:document-meta>
</file>