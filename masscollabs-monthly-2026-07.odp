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sscollabs Service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Rebuilding Masscollabs Services as a Platform that replaces existing Open Source and Free Software Projec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Git and development platform</text:p>
              </text:list-item>
              <text:list-item>
                <text:p>Streaming platform ( video , music, sound , text collaboration live editing ) </text:p>
              </text:list-item>
              <text:list-item>
                <text:p>File storage and backup and disk security</text:p>
              </text:list-item>
              <text:list-item>
                <text:p>And more collaboration features and goals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01:56:12.563825943</meta:creation-date>
    <meta:editing-duration>PT2M56S</meta:editing-duration>
    <meta:editing-cycles>7</meta:editing-cycles>
    <meta:generator>LibreOffice/24.2.7.2$Linux_X86_64 LibreOffice_project/420$Build-2</meta:generator>
    <dc:title>DNA</dc:title>
    <dc:date>2026-06-17T01:59:10.977856691</dc:date>
    <meta:document-statistic meta:object-count="114"/>
  </office:meta>
</office:document-meta>
</file>