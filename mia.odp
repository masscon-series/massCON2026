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ia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Milli İletişim Ağı : İnternet yeniden tanımlandı !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ia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Mevcut internet ve iletişim protokollerine cevaben</text:p>
              </text:list-item>
              <text:list-item>
                <text:p>Matrix, activitypub , ipfs gibi yeni web ile uyumlu</text:p>
              </text:list-item>
              <text:list-item>
                <text:p>Çökme ve veri kaybına karşı yapay zeka ile dinamik uyumlu kendini yenileyebilen bir sistem</text:p>
              </text:list-item>
              <text:list-item>
                <text:p>%100 Özgür Yazılım</text:p>
              </text:list-item>
              <text:list-item>
                <text:p>%100 açık gelişim yani her kod ve içerik kamuya açı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i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QB Networks destekli, bilgi güvenliği ile donatılmış ve desteklenen</text:p>
              </text:list-item>
              <text:list-item>
                <text:p>Diğer tüm kişi , kurum, şirket , devlet organizasyonları , vakıf ve derneklerin katkısına açık</text:p>
              </text:list-item>
              <text:list-item>
                <text:p>AGPLv3-or-later ile SaaS , Cloud sömürüsüne kapalı</text:p>
              </text:list-item>
              <text:list-item>
                <text:p>Merkeziyetsiz geliştirme odaklı ve teknik mükemmeliyetçiliği özgürlüğe tabi kıl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Q&amp;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3">Email to : <text:a xlink:href="mailto:mertgor@qbnetworks.xyz" xlink:type="simple">mertgor@qbnetworks.xyz</text:a></text:p>
              </text:list-item>
              <text:list-item>
                <text:p text:style-name="P3">GPG Key ID : 0xCD9E83BD9F84F0AB</text:p>
              </text:list-item>
              <text:list-item>
                <text:p text:style-name="P3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03:01:41.878406416</meta:creation-date>
    <meta:editing-duration>PT8M21S</meta:editing-duration>
    <meta:editing-cycles>16</meta:editing-cycles>
    <meta:generator>LibreOffice/24.2.7.2$Linux_X86_64 LibreOffice_project/420$Build-2</meta:generator>
    <dc:title>DNA</dc:title>
    <dc:date>2026-05-01T03:10:07.412608219</dc:date>
    <meta:document-statistic meta:object-count="118"/>
  </office:meta>
</office:document-meta>
</file>