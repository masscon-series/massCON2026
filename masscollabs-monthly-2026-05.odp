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B Networks : Why it matters ?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We believe that Public Collaboration without Openness is not Collaboration and it is only built with Free Software and Open Source Governance model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QB Networks Q&amp;A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3">Email to : <text:a xlink:href="mailto:mertgor@qbnetworks.xyz" xlink:type="simple">mertgor@qbnetworks.xyz</text:a></text:p>
              </text:list-item>
              <text:list-item>
                <text:p text:style-name="P3">GPG Key ID : 0xCD9E83BD9F84F0AB</text:p>
              </text:list-item>
              <text:list-item>
                <text:p text:style-name="P3">This document is licensed under the terms of <text:a xlink:href="https://github.com/masscollabs/Creative-Commons-Markdown/blob/main/4.0/by-sa.markdown" xlink:type="simple">CC BY-SA 4.0</text:a><text:s/>or later licen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eehive1-background" style:display-name="1_Beehive1-background" style:family="presentation">
      <style:graphic-properties draw:stroke="none" draw:fill="none"/>
      <style:text-properties style:letter-kerning="true"/>
    </style:style>
    <style:style style:name="_31__5f_Beehive1-backgroundobjects" style:display-name="1_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_31__5f_Beehive1-notes" style:display-name="1_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ehive1-outline1" style:display-name="1_Beehive1-outline1" style:family="presentation">
      <style:graphic-properties draw:stroke="none" draw:fill="none" draw:auto-grow-height="false" draw:fit-to-size="false" style:shrink-to-fit="true">
        <text:list-style style:name="_31__5f_Beehive1-outline1" style:display-name="1_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eehive1-outline2" style:display-name="1_Beehive1-outline2" style:family="presentation" style:parent-style-name="_31__5f_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_31__5f_Beehive1-outline3" style:display-name="1_Beehive1-outline3" style:family="presentation" style:parent-style-name="_31__5f_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1__5f_Beehive1-outline4" style:display-name="1_Beehive1-outline4" style:family="presentation" style:parent-style-name="_31__5f_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_31__5f_Beehive1-outline5" style:display-name="1_Beehive1-outline5" style:family="presentation" style:parent-style-name="_31__5f_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outline6" style:display-name="1_Beehive1-outline6" style:family="presentation" style:parent-style-name="_31__5f_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outline7" style:display-name="1_Beehive1-outline7" style:family="presentation" style:parent-style-name="_31__5f_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outline8" style:display-name="1_Beehive1-outline8" style:family="presentation" style:parent-style-name="_31__5f_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outline9" style:display-name="1_Beehive1-outline9" style:family="presentation" style:parent-style-name="_31__5f_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subtitle" style:display-name="1_Beehive1-subtitle" style:family="presentation">
      <style:graphic-properties draw:stroke="none" draw:fill="none" draw:textarea-vertical-align="middle">
        <text:list-style style:name="_31__5f_Beehive1-subtitle" style:display-name="1_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ehive1-title" style:display-name="1_Beehive1-title" style:family="presentation">
      <style:graphic-properties draw:stroke="none" draw:fill="none" draw:textarea-vertical-align="middle">
        <text:list-style style:name="_31__5f_Beehive1-title" style:display-name="1_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933cm" fo:min-width="1.933cm" fo:padding-top="0.009cm" fo:padding-bottom="0.009cm" fo:padding-left="0.009cm" fo:padding-right="0.009cm" fo:wrap-option="wrap" loext:decorative="false"/>
    </style:style>
    <style:style style:name="Mgr8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951cm" fo:min-width="1.951cm" fo:wrap-option="wrap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_31__5f_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5" style:family="presentation" style:parent-style-name="_31__5f_Beehive1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_31__5f_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P9" style:family="paragraph">
      <loext:graphic-properties draw:fill="solid" draw:fill-color="#fff5ce" draw:opacity="100%"/>
    </style:style>
    <style:style style:name="MP10" style:family="paragraph">
      <loext:graphic-properties draw:fill="solid" draw:fill-color="#ffde59" draw:opacity="100%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eehive1" style:display-name="1_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6">
        <draw:custom-shape draw:style-name="Mgr7" draw:text-style-name="MP9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0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0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9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_31__5f_Beehive1-title" draw:layer="backgroundobjects" svg:width="25.199cm" svg:height="2.63cm" svg:x="1.4cm" svg:y="0.627cm" presentation:class="title" presentation:placeholder="true">
        <draw:text-box/>
      </draw:frame>
      <draw:frame presentation:style-name="_31__5f_Beehive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5" draw:layer="backgroundobjects" svg:width="12.725cm" svg:height="1.956cm" svg:x="7.624cm" svg:y="13.6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5" draw:layer="backgroundobjects" svg:width="3.175cm" svg:height="1.95cm" svg:x="23.595cm" svg:y="13.65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Beehive1-title" draw:layer="backgroundobjects" svg:width="17cm" svg:height="9.56cm" svg:x="2cm" svg:y="2.5cm" presentation:class="page"/>
        <draw:frame presentation:style-name="_31__5f_Beehi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22:08:39.168399061</meta:creation-date>
    <meta:editing-duration>PT4M46S</meta:editing-duration>
    <meta:editing-cycles>4</meta:editing-cycles>
    <meta:generator>LibreOffice/24.2.7.2$Linux_X86_64 LibreOffice_project/420$Build-2</meta:generator>
    <dc:title>DNA</dc:title>
    <dc:date>2026-04-02T22:13:24.851339606</dc:date>
    <meta:document-statistic meta:object-count="152"/>
  </office:meta>
</office:document-meta>
</file>