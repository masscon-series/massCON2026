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+ PSD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The mind behind PS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yberian Systems Distribu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upport to existing projects like Linux, BSDs and Hurd</text:p>
              </text:list-item>
              <text:list-item>
                <text:p>A unique GNU distribution</text:p>
              </text:list-item>
              <text:list-item>
                <text:p>Then a unique micro-kernel based OS</text:p>
              </text:list-item>
              <text:list-item>
                <text:p>Combining Copyleft, Permissive and Proprietary projec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GPLv3-or-later for our codebase</text:p>
              </text:list-item>
              <text:list-item>
                <text:p>Permissive licenses are embraced to be more open</text:p>
              </text:list-item>
              <text:list-item>
                <text:p>Proprietary code projects are allowed such as device drivers or userspace applications and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12:36:39.431176271</meta:creation-date>
    <meta:editing-duration>PT5M25S</meta:editing-duration>
    <meta:editing-cycles>12</meta:editing-cycles>
    <meta:generator>LibreOffice/24.2.7.2$Linux_X86_64 LibreOffice_project/420$Build-2</meta:generator>
    <dc:title>DNA</dc:title>
    <dc:date>2026-07-11T12:42:08.153414095</dc:date>
    <meta:document-statistic meta:object-count="118"/>
  </office:meta>
</office:document-meta>
</file>