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eehive-title">
      <style:graphic-properties draw:auto-grow-height="true"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2.95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outline1">
      <style:graphic-properties fo:min-height="9.135cm" loext:decorative="false"/>
      <style:paragraph-properties style:writing-mode="lr-tb"/>
    </style:style>
    <style:style style:name="pr9" style:family="presentation" style:parent-style-name="Beehi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_31__5f_Beehive1-title">
      <style:graphic-properties fo:min-height="2.63cm" loext:decorative="false"/>
      <style:paragraph-properties style:writing-mode="lr-tb"/>
    </style:style>
    <style:style style:name="pr11" style:family="presentation" style:parent-style-name="_31__5f_Beehive1-outline1">
      <style:graphic-properties fo:min-height="9.135cm" loext:decorative="false"/>
      <style:paragraph-properties style:writing-mode="lr-tb"/>
    </style:style>
    <style:style style:name="pr12" style:family="presentation" style:parent-style-name="_31__5f_Beehi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QB Networks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QB Networks : A new Leadership Way &amp; Styl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What QB Networks Expects from Open Source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Collaboration</text:p>
              </text:list-item>
              <text:list-item>
                <text:p>Warm welcome to community for communication</text:p>
              </text:list-item>
              <text:list-item>
                <text:p>Opennes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 text:style-name="P4">What is the promise of QB Networks to Society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active and converged development and security services</text:p>
              </text:list-item>
              <text:list-item>
                <text:p>Openness</text:p>
              </text:list-item>
              <text:list-item>
                <text:p>Always ready for individuals and any kind of organiz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_31__5f_Beehive1" presentation:presentation-page-layout-name="AL2T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 text:style-name="P4">QB Networks Q&amp;A</text:p>
          </draw:text-box>
        </draw:frame>
        <draw:frame presentation:style-name="pr11" draw:layer="layout" svg:width="25.199cm" svg:height="9.134cm" svg:x="1.4cm" svg:y="3.685cm" presentation:class="outline">
          <draw:text-box>
            <text:list text:style-name="L2">
              <text:list-item>
                <text:p text:style-name="P5">Email to : <text:a xlink:href="mailto:mertgor@qbnetworks.xyz" xlink:type="simple">mertgor@qbnetworks.xyz</text:a></text:p>
              </text:list-item>
              <text:list-item>
                <text:p text:style-name="P5">GPG Key ID : 0xCD9E83BD9F84F0AB</text:p>
              </text:list-item>
              <text:list-item>
                <text:p text:style-name="P5">This document is licensed under the terms of <text:a xlink:href="https://github.com/masscollabs/Creative-Commons-Markdown/blob/main/4.0/by-sa.markdown" xlink:type="simple">CC BY-SA 4.0</text:a><text:s/>or later licens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eehive1-background" style:display-name="1_Beehive1-background" style:family="presentation">
      <style:graphic-properties draw:stroke="none" draw:fill="none"/>
      <style:text-properties style:letter-kerning="true"/>
    </style:style>
    <style:style style:name="_31__5f_Beehive1-backgroundobjects" style:display-name="1_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_31__5f_Beehive1-notes" style:display-name="1_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ehive1-outline1" style:display-name="1_Beehive1-outline1" style:family="presentation">
      <style:graphic-properties draw:stroke="none" draw:fill="none" draw:auto-grow-height="false" draw:fit-to-size="false" style:shrink-to-fit="true">
        <text:list-style style:name="_31__5f_Beehive1-outline1" style:display-name="1_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eehive1-outline2" style:display-name="1_Beehive1-outline2" style:family="presentation" style:parent-style-name="_31__5f_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_31__5f_Beehive1-outline3" style:display-name="1_Beehive1-outline3" style:family="presentation" style:parent-style-name="_31__5f_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1__5f_Beehive1-outline4" style:display-name="1_Beehive1-outline4" style:family="presentation" style:parent-style-name="_31__5f_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_31__5f_Beehive1-outline5" style:display-name="1_Beehive1-outline5" style:family="presentation" style:parent-style-name="_31__5f_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outline6" style:display-name="1_Beehive1-outline6" style:family="presentation" style:parent-style-name="_31__5f_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outline7" style:display-name="1_Beehive1-outline7" style:family="presentation" style:parent-style-name="_31__5f_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outline8" style:display-name="1_Beehive1-outline8" style:family="presentation" style:parent-style-name="_31__5f_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outline9" style:display-name="1_Beehive1-outline9" style:family="presentation" style:parent-style-name="_31__5f_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subtitle" style:display-name="1_Beehive1-subtitle" style:family="presentation">
      <style:graphic-properties draw:stroke="none" draw:fill="none" draw:textarea-vertical-align="middle">
        <text:list-style style:name="_31__5f_Beehive1-subtitle" style:display-name="1_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ehive1-title" style:display-name="1_Beehive1-title" style:family="presentation">
      <style:graphic-properties draw:stroke="none" draw:fill="none" draw:textarea-vertical-align="middle">
        <text:list-style style:name="_31__5f_Beehive1-title" style:display-name="1_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1cm" svg:stroke-color="#ffde59" draw:marker-start-width="0.36cm" draw:marker-end-width="0.36cm" svg:stroke-opacity="100%" draw:fill="solid" draw:fill-color="#fff5ce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svg:stroke-width="0.1cm" svg:stroke-color="#ffde59" svg:stroke-opacity="100%" draw:fill="solid" draw:fill-color="#ffde59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</style:style>
    <style:style style:name="Mgr5" style:family="graphic">
      <style:graphic-properties style:writing-mode="lr-tb" loext:decorative="false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8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933cm" fo:min-width="1.933cm" fo:padding-top="0.009cm" fo:padding-bottom="0.009cm" fo:padding-left="0.009cm" fo:padding-right="0.009cm" fo:wrap-option="wrap" loext:decorative="false"/>
    </style:style>
    <style:style style:name="Mgr9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951cm" fo:min-width="1.951cm" fo:wrap-option="wrap" loext:decorative="fals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_31__5f_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_31__5f_Beehive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_31__5f_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  <style:paragraph-properties fo:text-align="center" style:writing-mode="lr-tb" style:font-independent-line-spacing="true"/>
    </style:style>
    <style:style style:name="MP6" style:family="paragraph">
      <loext:graphic-properties draw:fill="solid" draw:fill-color="#ffde59" draw:opacity="100%"/>
      <style:paragraph-properties fo:text-align="center" style:writing-mode="lr-tb" style:font-independent-line-spacing="true"/>
    </style:style>
    <style:style style:name="MP7" style:family="paragraph">
      <loext:graphic-properties draw:opacity="100%"/>
      <style:paragraph-properties fo:text-align="center" style:writing-mode="lr-tb" style:font-independent-line-spacing="true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solid" draw:fill-color="#fff5ce" draw:opacity="100%"/>
    </style:style>
    <style:style style:name="MP12" style:family="paragraph">
      <loext:graphic-properties draw:fill="solid" draw:fill-color="#ffde59" draw:opacity="100%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23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3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eehive1" style:display-name="1_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8" draw:text-style-name="MP11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2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2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_31__5f_Beehive1-title" draw:layer="backgroundobjects" svg:width="25.199cm" svg:height="2.63cm" svg:x="1.4cm" svg:y="0.627cm" presentation:class="title" presentation:placeholder="true">
        <draw:text-box/>
      </draw:frame>
      <draw:frame presentation:style-name="_31__5f_Beehive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Beehive1-title" draw:layer="backgroundobjects" svg:width="17cm" svg:height="9.56cm" svg:x="2cm" svg:y="2.5cm" presentation:class="page"/>
        <draw:frame presentation:style-name="_31__5f_Beehiv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20:15:26.241798412</meta:creation-date>
    <meta:editing-duration>PT3M28S</meta:editing-duration>
    <meta:editing-cycles>13</meta:editing-cycles>
    <meta:generator>LibreOffice/24.2.7.2$Linux_X86_64 LibreOffice_project/420$Build-2</meta:generator>
    <dc:title>Beehive</dc:title>
    <dc:date>2026-03-15T20:18:58.040131905</dc:date>
    <meta:document-statistic meta:object-count="194"/>
  </office:meta>
</office:document-meta>
</file>